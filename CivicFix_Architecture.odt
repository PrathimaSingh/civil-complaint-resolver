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856cm"/>
    </style:style>
    <style:style style:name="Table1.B" style:family="table-column">
      <style:table-column-properties style:column-width="7.283cm"/>
    </style:style>
    <style:style style:name="Table1.C" style:family="table-column">
      <style:table-column-properties style:column-width="7.86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136cm" table:align="left"/>
    </style:style>
    <style:style style:name="Table2.A" style:family="table-column">
      <style:table-column-properties style:column-width="4.325cm"/>
    </style:style>
    <style:style style:name="Table2.B" style:family="table-column">
      <style:table-column-properties style:column-width="9.81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color="#1c1c1c" loext:opacity="100%" fo:font-weight="bold" style:font-weight-asian="bold" style:font-weight-complex="bold"/>
    </style:style>
    <style:style style:name="P2" style:family="paragraph" style:parent-style-name="Heading_20_3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text-properties officeooo:rsid="002ab430" officeooo:paragraph-rsid="002ab430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officeooo:rsid="0016eb94"/>
    </style:style>
    <style:style style:name="T2" style:family="text">
      <style:text-properties officeooo:rsid="0019ddb0"/>
    </style:style>
    <style:style style:name="T3" style:family="text">
      <style:text-properties officeooo:rsid="00249c25"/>
    </style:style>
    <style:style style:name="T4" style:family="text">
      <style:text-properties officeooo:rsid="00267a08"/>
    </style:style>
    <style:style style:name="T5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Overall Architecture Overview</text:h>
      <text:p text:style-name="Text_20_body"><text:span text:style-name="T2">Our</text:span> application follows a <text:span text:style-name="Strong_20_Emphasis">hybrid architecture</text:span>:</text:p>
      <text:list xml:id="list1958900935" text:style-name="L1">
        <text:list-item>
          <text:p text:style-name="P5"><text:span text:style-name="Strong_20_Emphasis">Backend Core</text:span>: LangGraph (State Machine / Graph-based workflow) </text:p>
        </text:list-item>
        <text:list-item>
          <text:p text:style-name="P5"><text:span text:style-name="Strong_20_Emphasis">Web Interface</text:span>: Flask (Lightweight Python web framework) </text:p>
        </text:list-item>
        <text:list-item>
          <text:p text:style-name="P5"><text:span text:style-name="Strong_20_Emphasis">Data Storage</text:span>: JSON file + Vector DB (for RAG) </text:p>
        </text:list-item>
        <text:list-item>
          <text:p text:style-name="P5"><text:span text:style-name="Strong_20_Emphasis">AI Layer</text:span>: Ollama + Gemma4 Vision model (for image analysis) </text:p>
        </text:list-item>
        <text:list-item>
          <text:p text:style-name="P4"><text:span text:style-name="Strong_20_Emphasis">Image Processing</text:span>: PIL + ImageHash (for duplicate detection)</text:p>
        </text:list-item>
      </text:list>
      <text:p text:style-name="Standard"/>
      <text:p text:style-name="P1">High-Level Architecture Diagram</text:p>
      <text:p text:style-name="Standard"/>
      <text:p text:style-name="Standard"/>
      <text:p text:style-name="Standard">User Browser</text:p>
      <text:p text:style-name="Standard"><text:s text:c="5"/>↓ (HTTP)</text:p>
      <text:p text:style-name="Standard">Flask App (<text:span text:style-name="T3">UI_</text:span>app.py)</text:p>
      <text:p text:style-name="Standard"><text:s text:c="5"/>↓</text:p>
      <text:p text:style-name="Standard"><text:s text:c="3"/>Routes:</text:p>
      <text:p text:style-name="Standard"><text:s text:c="3"/>├── / <text:s text:c="14"/><text:tab/><text:tab/>→ index.html</text:p>
      <text:p text:style-name="Standard"><text:s text:c="3"/>├── /upload/incoming <text:tab/>→ Upload + Auto Process</text:p>
      <text:p text:style-name="Standard"><text:s text:c="3"/>├── /upload/resolved <text:tab/>→ Upload + Auto Close</text:p>
      <text:p text:style-name="Standard"><text:s text:c="3"/>└── /analytics <text:s text:c="5"/><text:tab/><text:tab/>→ Dashboard</text:p>
      <text:p text:style-name="Standard"><text:s text:c="5"/>↓</text:p>
      <text:p text:style-name="Standard">LangGraph Workflow (complaint_resolver.py)</text:p>
      <text:p text:style-name="Standard"><text:s text:c="5"/>↓</text:p>
      <text:p text:style-name="Standard">State Machine (6 Main Nodes)</text:p>
      <text:p text:style-name="Standard"><text:s text:c="5"/>├── Analyzer Node <text:s text:c="4"/>→ Image → AI Analysis + Duplicate Check + ID Generation</text:p>
      <text:p text:style-name="Standard"><text:s text:c="5"/>├── Router Node <text:s text:c="6"/>→ Decide Authority (Municipal/MoRTH/<text:span text:style-name="T1">BESCOM</text:span>)-<text:span text:style-name="T3">and many more...</text:span></text:p>
      <text:p text:style-name="Standard"><text:s text:c="5"/>├── Creator Node <text:s text:c="5"/>→ Generate message + Save to JSON DB</text:p>
      <text:p text:style-name="Standard"><text:s text:c="5"/>├── Storage Node <text:s text:c="5"/>→ Save to Vector DB (RAG)</text:p>
      <text:p text:style-name="Standard"><text:s text:c="5"/>├── Tracker Node <text:s text:c="5"/>→ Generate Analytics</text:p>
      <text:p text:style-name="Standard"><text:s text:c="5"/>└── Closer Node <text:s text:c="6"/>→ Close complaint with resolved image</text:p>
      <text:p text:style-name="Standard"/>
      <text:p text:style-name="Standard"/>
      <text:h text:style-name="Heading_20_3" text:outline-level="3">Detailed Breakdown of Components</text:h>
      <text:h text:style-name="Heading_20_4" text:outline-level="4">1. <text:span text:style-name="Strong_20_Emphasis">Core Workflow Engine (LangGraph)</text:span></text:h>
      <text:list xml:id="list308896626" text:style-name="L2">
        <text:list-item>
          <text:p text:style-name="P7">Located in: complaint_resolver.py </text:p>
        </text:list-item>
        <text:list-item>
          <text:p text:style-name="P7">Uses <text:span text:style-name="Strong_20_Emphasis">StateGraph</text:span> to define a directed workflow </text:p>
        </text:list-item>
        <text:list-item>
          <text:p text:style-name="P7"><text:span text:style-name="Strong_20_Emphasis">State</text:span> (ComplaintState) holds all data during processing:</text:p>
          <text:list>
            <text:list-item>
              <text:p text:style-name="P7">image_path, complaint_id, complaint_type, authority, analysis, messages, analytics, etc. </text:p>
              <text:p text:style-name="P7"/>
            </text:list-item>
          </text:list>
        </text:list-item>
        <text:list-item>
          <text:p text:style-name="P6">Flow is fixed: <text:span text:style-name="Strong_20_Emphasis">START → Analyzer → Router → Creator → Storage → Tracker → END</text:span>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4" text:outline-level="4">2. <text:span text:style-name="Strong_20_Emphasis">Key Nodes (Tasks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ode</text:p>
            </table:table-cell>
            <table:table-cell table:style-name="Table1.A1" office:value-type="string">
              <text:p text:style-name="Table_20_Heading">Responsibility</text:p>
            </table:table-cell>
            <table:table-cell table:style-name="Table1.A1" office:value-type="string">
              <text:p text:style-name="Table_20_Heading">Key Featur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nalyzer</text:span></text:p>
          </table:table-cell>
          <table:table-cell table:style-name="Table1.A1" office:value-type="string">
            <text:p text:style-name="Table_20_Contents">Image analysis + Duplicate detection</text:p>
          </table:table-cell>
          <table:table-cell table:style-name="Table1.A1" office:value-type="string">
            <text:p text:style-name="Table_20_Contents">Gemma4 Vision, Perceptual Hashing, ID gener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outer</text:span></text:p>
          </table:table-cell>
          <table:table-cell table:style-name="Table1.A1" office:value-type="string">
            <text:p text:style-name="Table_20_Contents">Decide which authority to route to</text:p>
          </table:table-cell>
          <table:table-cell table:style-name="Table1.A1" office:value-type="string">
            <text:p text:style-name="Table_20_Contents">Keyword-based rout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reator</text:span></text:p>
          </table:table-cell>
          <table:table-cell table:style-name="Table1.A1" office:value-type="string">
            <text:p text:style-name="Table_20_Contents">Create complaint record + save to JSON</text:p>
          </table:table-cell>
          <table:table-cell table:style-name="Table1.A1" office:value-type="string">
            <text:p text:style-name="Table_20_Contents">Saves to complaints_db.js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orage</text:span></text:p>
          </table:table-cell>
          <table:table-cell table:style-name="Table1.A1" office:value-type="string">
            <text:p text:style-name="Table_20_Contents">Store embedding in Vector DB</text:p>
          </table:table-cell>
          <table:table-cell table:style-name="Table1.A1" office:value-type="string">
            <text:p text:style-name="Table_20_Contents">For future RAG search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racker</text:span></text:p>
          </table:table-cell>
          <table:table-cell table:style-name="Table1.A1" office:value-type="string">
            <text:p text:style-name="Table_20_Contents">Generate analytics (Type, Category, Authority)</text:p>
          </table:table-cell>
          <table:table-cell table:style-name="Table1.A1" office:value-type="string">
            <text:p text:style-name="Table_20_Contents">Used by both console and Flas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loser</text:span></text:p>
          </table:table-cell>
          <table:table-cell table:style-name="Table1.A1" office:value-type="string">
            <text:p text:style-name="Table_20_Contents">Mark complaint as closed + save resolved image</text:p>
          </table:table-cell>
          <table:table-cell table:style-name="Table1.A1" office:value-type="string">
            <text:p text:style-name="Table_20_Contents">Separate small graph</text:p>
          </table:table-cell>
        </table:table-row>
      </table:table>
      <text:h text:style-name="Heading_20_4" text:outline-level="4">3. <text:span text:style-name="Strong_20_Emphasis">Web Layer (Flask)</text:span></text:h>
      <text:list xml:id="list1099376588" text:style-name="L3">
        <text:list-item>
          <text:p text:style-name="P9">Located in: <text:span text:style-name="T4">UI</text:span>_App.py </text:p>
        </text:list-item>
        <text:list-item>
          <text:p text:style-name="P9">Provides <text:span text:style-name="Strong_20_Emphasis">user-friendly browser interface</text:span> </text:p>
        </text:list-item>
        <text:list-item>
          <text:p text:style-name="P9">Handles file uploads (incoming and resolved) </text:p>
        </text:list-item>
        <text:list-item>
          <text:p text:style-name="P9">Automatically triggers LangGraph workflow after upload </text:p>
        </text:list-item>
        <text:list-item>
          <text:p text:style-name="P8">Serves beautiful analytics dashboard </text:p>
        </text:list-item>
      </text:list>
      <text:h text:style-name="Heading_20_4" text:outline-level="4">4. <text:span text:style-name="Strong_20_Emphasis">Data Storage</text:span></text:h>
      <text:list xml:id="list2064116304" text:style-name="L4">
        <text:list-item>
          <text:p text:style-name="P11"><text:span text:style-name="Strong_20_Emphasis">Primary DB</text:span>: complaints_db.json (simple, human-readable) </text:p>
        </text:list-item>
        <text:list-item>
          <text:p text:style-name="P11"><text:span text:style-name="Strong_20_Emphasis">Vector DB</text:span>: complaint_vector_db.py (for semantic search / RAG) </text:p>
        </text:list-item>
        <text:list-item>
          <text:p text:style-name="P11"><text:span text:style-name="Strong_20_Emphasis">Folders</text:span>:</text:p>
          <text:list>
            <text:list-item>
              <text:p text:style-name="P11">incoming_complaints/ </text:p>
            </text:list-item>
            <text:list-item>
              <text:p text:style-name="P11">resolved_complaints/ </text:p>
            </text:list-item>
            <text:list-item>
              <text:p text:style-name="P10">sent_messages/ </text:p>
            </text:list-item>
          </text:list>
        </text:list-item>
      </text:list>
      <text:h text:style-name="Heading_20_4" text:outline-level="4">5. <text:span text:style-name="Strong_20_Emphasis">AI &amp; Image Processing</text:span></text:h>
      <text:list xml:id="list1403537332" text:style-name="L5">
        <text:list-item>
          <text:p text:style-name="P13"><text:span text:style-name="Strong_20_Emphasis">Vision Model</text:span>: gemma4:e4b via Ollama </text:p>
        </text:list-item>
        <text:list-item>
          <text:p text:style-name="P13"><text:span text:style-name="Strong_20_Emphasis">Duplicate Detection</text:span>: Perceptual Hash (pHash + dHash) </text:p>
        </text:list-item>
        <text:list-item>
          <text:p text:style-name="P12"><text:span text:style-name="Strong_20_Emphasis">Prompt Engineering</text:span>: Strict JSON output from LLM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T4">6. </text:span>File-wise Responsibilit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ile</text:p>
            </table:table-cell>
            <table:table-cell table:style-name="Table2.A1" office:value-type="string">
              <text:p text:style-name="Table_20_Heading">Role</text:p>
            </table:table-cell>
          </table:table-row>
        </table:table-header-rows>
        <table:table-row>
          <table:table-cell table:style-name="Table2.A1" office:value-type="string">
            <text:p text:style-name="Table_20_Contents">complaint_resolver.py</text:p>
          </table:table-cell>
          <table:table-cell table:style-name="Table2.A1" office:value-type="string">
            <text:p text:style-name="Table_20_Contents">Main business logic + LangGraph workflow + Analytics</text:p>
          </table:table-cell>
        </table:table-row>
        <table:table-row>
          <table:table-cell table:style-name="Table2.A1" office:value-type="string">
            <text:p text:style-name="Table_20_Contents">flask_App.py</text:p>
          </table:table-cell>
          <table:table-cell table:style-name="Table2.A1" office:value-type="string">
            <text:p text:style-name="Table_20_Contents">Web server, routes, file upload handling, dashboard</text:p>
          </table:table-cell>
        </table:table-row>
        <table:table-row>
          <table:table-cell table:style-name="Table2.A1" office:value-type="string">
            <text:p text:style-name="Table_20_Contents">templates/*.html</text:p>
          </table:table-cell>
          <table:table-cell table:style-name="Table2.A1" office:value-type="string">
            <text:p text:style-name="Table_20_Contents">Frontend UI </text:p>
          </table:table-cell>
        </table:table-row>
        <table:table-row>
          <table:table-cell table:style-name="Table2.A1" office:value-type="string">
            <text:p text:style-name="Table_20_Contents">complaint_vector_db.py</text:p>
          </table:table-cell>
          <table:table-cell table:style-name="Table2.A1" office:value-type="string">
            <text:p text:style-name="Table_20_Contents">Vector database operations (RAG)</text:p>
          </table:table-cell>
        </table:table-row>
        <table:table-row>
          <table:table-cell table:style-name="Table2.A1" office:value-type="string">
            <text:p text:style-name="Table_20_Contents">complaints_db.json</text:p>
          </table:table-cell>
          <table:table-cell table:style-name="Table2.A1" office:value-type="string">
            <text:p text:style-name="Table_20_Contents">Persistent storage of all complaints</text:p>
          </table:table-cell>
        </table:table-row>
      </table:table>
      <text:h text:style-name="Heading_20_3" text:outline-level="3"/>
      <text:h text:style-name="Heading_20_3" text:outline-level="3"><text:span text:style-name="T4">7. </text:span>Data Flow Example (New Complaint)</text:h>
      <text:list xml:id="list3091307519" text:style-name="L6">
        <text:list-item>
          <text:p text:style-name="P15">User uploads image via browser → /upload/incoming </text:p>
        </text:list-item>
        <text:list-item>
          <text:p text:style-name="P15">Flask saves image to incoming_complaints/ </text:p>
        </text:list-item>
        <text:list-item>
          <text:p text:style-name="P15">Calls process_new_complaint() </text:p>
        </text:list-item>
        <text:list-item>
          <text:p text:style-name="P15">LangGraph starts:</text:p>
          <text:list>
            <text:list-item>
              <text:p text:style-name="P15"><text:span text:style-name="Strong_20_Emphasis">Analyzer</text:span>: Checks duplicate → Calls Gemma4 Vision → Extracts complaint_type + description → Generates ID </text:p>
            </text:list-item>
            <text:list-item>
              <text:p text:style-name="P15"><text:span text:style-name="Strong_20_Emphasis">Router</text:span>: Decides Municipal Corporation, MoRTH , <text:span text:style-name="T3">BESCOM</text:span></text:p>
            </text:list-item>
            <text:list-item>
              <text:p text:style-name="P15"><text:span text:style-name="Strong_20_Emphasis">Creator</text:span>: Creates .txt message + saves record in JSON </text:p>
            </text:list-item>
            <text:list-item>
              <text:p text:style-name="P15"><text:span text:style-name="Strong_20_Emphasis">Storage</text:span>: Stores in Vector DB </text:p>
            </text:list-item>
            <text:list-item>
              <text:p text:style-name="P15"><text:span text:style-name="Strong_20_Emphasis">Tracker</text:span>: Updates analytics </text:p>
            </text:list-item>
          </text:list>
        </text:list-item>
        <text:list-item>
          <text:p text:style-name="P14">User sees success message </text:p>
        </text:list-item>
      </text:list>
      <text:h text:style-name="Heading_20_3" text:outline-level="3"><text:span text:style-name="T4">8. </text:span>Strengths of This Architecture</text:h>
      <text:list xml:id="list1899769569" text:style-name="L7">
        <text:list-item>
          <text:p text:style-name="P17"><text:span text:style-name="Strong_20_Emphasis">Modular</text:span>: LangGraph nodes are independent and easy to modify </text:p>
        </text:list-item>
        <text:list-item>
          <text:p text:style-name="P17"><text:span text:style-name="Strong_20_Emphasis">Stateful</text:span>: Full conversation/memory via MemorySaver </text:p>
        </text:list-item>
        <text:list-item>
          <text:p text:style-name="P17"><text:span text:style-name="Strong_20_Emphasis">Separation of Concerns</text:span>: Workflow logic separate from Web layer </text:p>
        </text:list-item>
        <text:list-item>
          <text:p text:style-name="P17"><text:span text:style-name="Strong_20_Emphasis">Extensible</text:span>: Easy to add new nodes (e.g., notification, email, approval) </text:p>
        </text:list-item>
        <text:list-item>
          <text:p text:style-name="P17"><text:span text:style-name="Strong_20_Emphasis">Dual Interface</text:span>: Works via command line + beautiful web dashboard </text:p>
        </text:list-item>
        <text:list-item>
          <text:p text:style-name="P16"><text:span text:style-name="Strong_20_Emphasis">Duplicate Protection</text:span>: Strong perceptual hashing </text:p>
        </text:list-item>
      </text:list>
      <text:h text:style-name="Heading_20_3" text:outline-level="3"><text:span text:style-name="T4">9. </text:span>Current Limitations / Areas for Improvement</text:h>
      <text:list xml:id="list3682971762" text:style-name="L8">
        <text:list-item>
          <text:p text:style-name="P19">No user authentication </text:p>
        </text:list-item>
        <text:list-item>
          <text:p text:style-name="P19">No proper error handling UI for complex failures </text:p>
        </text:list-item>
        <text:list-item>
          <text:p text:style-name="P19">Analytics calculation runs every time (can be cached) </text:p>
        </text:list-item>
        <text:list-item>
          <text:p text:style-name="P19">Ollama dependency (hard to scale) </text:p>
        </text:list-item>
        <text:list-item>
          <text:p text:style-name="P18">No logging system</text:p>
        </text:list-item>
      </text:list>
      <text:p text:style-name="P3">datasets for testing:<text:line-break/>1.https://www.kaggle.com/datasets/lorenzoarcioni/road-damage-dataset-potholes-cracks-and-manholes?resource=downloa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14:45:13.821179641</meta:creation-date>
    <dc:date>2026-04-19T12:43:38.183702710</dc:date>
    <meta:editing-duration>PT41M48S</meta:editing-duration>
    <meta:editing-cycles>7</meta:editing-cycles>
    <meta:generator>LibreOffice/7.3.7.2$Linux_X86_64 LibreOffice_project/30$Build-2</meta:generator>
    <meta:document-statistic meta:table-count="2" meta:image-count="0" meta:object-count="0" meta:page-count="3" meta:paragraph-count="112" meta:word-count="586" meta:character-count="4105" meta:non-whitespace-character-count="3517"/>
  </office:meta>
</office:document-meta>
</file>